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Quotations" style:list-style-name="L1"/>
    <style:style style:name="P3" style:family="paragraph" style:parent-style-name="Quotations" style:list-style-name="L1">
      <style:paragraph-properties fo:margin-top="0cm" fo:margin-bottom="0cm"/>
    </style:style>
    <style:style style:name="T1" style:family="text">
      <style:text-properties fo:color="#333333"/>
    </style:style>
    <style:style style:name="T2" style:family="text">
      <style:text-properties fo:color="#333333" fo:font-size="10pt"/>
    </style:style>
    <style:style style:name="T3" style:family="text">
      <style:text-properties fo:color="#333333" fo:font-size="12pt" style:font-size-asian="12pt" style:font-size-complex="12pt"/>
    </style:style>
    <style:style style:name="T4" style:family="text">
      <style:text-properties fo:color="#333333" fo:font-size="12pt" fo:font-weight="bold" style:font-size-asian="12pt" style:font-weight-asian="bold" style:font-size-complex="12pt" style:font-weight-complex="bold"/>
    </style:style>
    <style:style style:name="T5" style:family="text">
      <style:text-properties fo:color="#333333"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Los mecanismos son elementos destinados a transmitir y transformar fuerzas y movimientos desde un elemento motriz (motor) a un elemento conducido. Permiten al ser humano realizar determinados trabajos con mayor comodidad y con menos esfuerzo. </text:span><text:span text:style-name="Strong_20_Emphasis"><text:span text:style-name="T5">En base a esta definición</text:span></text:span><text:span text:style-name="T5"> </text:span><text:span text:style-name="T3">podemos clasificar los mecanismos en dos grandes grupos:</text:span></text:p>
      <text:list xml:id="list31279019" text:style-name="L1">
        <text:list-item>
          <text:p text:style-name="P3"><text:span text:style-name="T6">Mecanismos de transmisión del movimiento </text:span></text:p>
        </text:list-item>
        <text:list-item>
          <text:p text:style-name="P2"><text:span text:style-name="T6">Mecanismos de transformación del movimiento </text:span></text:p>
        </text:list-item>
      </text:list>
      <text:p text:style-name="P1">En el primer caso, el tipo de movimiento que tenga el elemento de entrada del mecanismo (elemento motriz) coincide con el tipo de movimiento que tenga el elemento de salida (elemento conducido).</text:p>
      <text:p text:style-name="P1">En el segundo caso, el tipo de movimiento que tenga el elemento de entrada del mecanismo es diferente del tipo de movimiento que tenga el elemento de salida, es decir, el tipo de movimiento se transforma en otro distinto, de ahí el nomb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0T11:14:22.72</meta:creation-date>
    <dc:date>2012-06-10T11:24:27.12</dc:date>
    <meta:editing-duration>PT8M45S</meta:editing-duration>
    <meta:editing-cycles>2</meta:editing-cycles>
    <meta:generator>LibreOffice/3.5$Windows_x86 LibreOffice_project/235ab8a-3802056-4a8fed3-2d66ea8-e241b80</meta:generator>
    <meta:document-statistic meta:table-count="0" meta:image-count="0" meta:object-count="0" meta:page-count="1" meta:paragraph-count="5" meta:word-count="135" meta:character-count="845" meta:non-whitespace-character-count="715"/>
  </office:meta>
</office:document-meta>
</file>